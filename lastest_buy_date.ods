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宋体" svg:font-family="宋体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3.73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974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top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" style:family="text">
      <style:text-properties style:use-window-font-color="true" style:font-name="宋体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宋体" style:font-name-asian="宋体"/>
    </style:style>
    <style:style style:name="T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000000" style:font-name="Calibri" fo:font-size="10.5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.5pt" style:font-size-complex="10.5pt" style:font-weight-asian="normal" style:font-weight-complex="normal" style:font-style-asian="normal" style:font-style-complex="normal"/>
    </style:style>
    <style:style style:name="T6" style:family="text">
      <style:text-properties fo:color="#000000" fo:font-size="10.5pt" fo:font-weight="normal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0.5pt" fo:font-weight="normal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3" table:default-cell-style-name="ce11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x_stock_name</text:p>
          </table:table-cell>
          <table:table-cell table:style-name="ce1" office:value-type="string" calcext:value-type="string">
            <text:p>broker_stock_name</text:p>
          </table:table-cell>
          <table:table-cell table:style-name="ce1" office:value-type="string" calcext:value-type="string">
            <text:p>stock_code</text:p>
          </table:table-cell>
          <table:table-cell table:style-name="ce1" office:value-type="string" calcext:value-type="string">
            <text:p>corp_code</text:p>
          </table:table-cell>
          <table:table-cell table:style-name="ce1" office:value-type="string" calcext:value-type="string">
            <text:p>exchange_code</text:p>
          </table:table-cell>
          <table:table-cell table:style-name="ce1" office:value-type="string" calcext:value-type="string">
            <text:p>stock_time_numb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中国国际海</text:span></text:p>
            <text:p><text:span text:style-name="T1">运集装箱</text:span></text:p>
            <text:p><text:span text:style-name="T1">（集团）股份有限公司</text:span></text:p>
          </table:table-cell>
          <table:table-cell table:number-columns-repeated="2"/>
          <table:table-cell office:value-type="string" calcext:value-type="string">
            <text:p><text:span text:style-name="T1">9144030061</text:span></text:p>
            <text:p><text:span text:style-name="T1">8869509J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3</text:span><text:span text:style-name="T3">年</text:span><text:span text:style-name="T4">13900</text:span><text:span text:style-name="T3">股</text:span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青岛港国际</text:span></text:p>
            <text:p><text:span text:style-name="T1">股份有限公</text:span></text:p>
            <text:p><text:span text:style-name="T1">司</text:span></text:p>
          </table:table-cell>
          <table:table-cell table:style-name="ce5" table:number-columns-repeated="2"/>
          <table:table-cell office:value-type="string" calcext:value-type="string">
            <text:p><text:span text:style-name="T1">9137020008</text:span></text:p>
            <text:p><text:span text:style-name="T1">1422810C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3</text:span><text:span text:style-name="T3">年</text:span><text:span text:style-name="T4">25000</text:span><text:span text:style-name="T3">股</text:span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1">北京京能清</text:span></text:p>
            <text:p><text:span text:style-name="T1">洁能源电力股份有限公</text:span></text:p>
            <text:p><text:span text:style-name="T1">司</text:span></text:p>
          </table:table-cell>
          <table:table-cell table:style-name="ce5" table:number-columns-repeated="2"/>
          <table:table-cell office:value-type="string" calcext:value-type="string">
            <text:p><text:span text:style-name="T1">9111000010</text:span></text:p>
            <text:p><text:span text:style-name="T1">1718150E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18</text:span><text:span text:style-name="T3">年</text:span><text:span text:style-name="T4">40000</text:span><text:span text:style-name="T3">股</text:span>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平安银行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44030019</text:span></text:p>
            <text:p><text:span text:style-name="T1">2185379H</text:span></text:p>
          </table:table-cell>
          <table:table-cell table:style-name="ce5" office:value-type="string" calcext:value-type="string">
            <text:p><text:span text:style-name="T1">股票投资</text:span></text:p>
            <text:p><text:span text:style-name="T1">（不含H股</text:span></text:p>
            <text:p><text:span text:style-name="T1">）</text:span></text:p>
          </table:table-cell>
          <table:table-cell table:style-name="ce12" office:value-type="string" calcext:value-type="string">
            <text:p><text:span text:style-name="T5">2020</text:span><text:span text:style-name="T6">年</text:span><text:span text:style-name="T7">1000</text:span><text:span text:style-name="T6">股</text:span>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中国工商银</text:span></text:p>
            <text:p><text:span text:style-name="T1">行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0000010</text:span></text:p>
            <text:p><text:span text:style-name="T1">0003962T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19</text:span><text:span text:style-name="T3">年</text:span><text:span text:style-name="T4">5000</text:span><text:span text:style-name="T3">股</text:span>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江西铜业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36000062</text:span></text:p>
            <text:p><text:span text:style-name="T1">5912173B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12" office:value-type="string" calcext:value-type="string">
            <text:p><text:span text:style-name="T5">2022</text:span><text:span text:style-name="T6">年</text:span><text:span text:style-name="T7">3000</text:span><text:span text:style-name="T6">股</text:span>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江苏宁沪高</text:span></text:p>
            <text:p><text:span text:style-name="T1">速公路股份有限公司</text:span></text:p>
          </table:table-cell>
          <table:table-cell table:number-columns-repeated="2"/>
          <table:table-cell office:value-type="string" calcext:value-type="string">
            <text:p><text:span text:style-name="T1">9132000013</text:span></text:p>
            <text:p><text:span text:style-name="T1">4762764K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2</text:span><text:span text:style-name="T3">年</text:span><text:span text:style-name="T4">8000</text:span><text:span text:style-name="T3">股</text:span>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<text:span text:style-name="T1">平安银行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44030019</text:span></text:p>
            <text:p><text:span text:style-name="T1">2185379H</text:span></text:p>
          </table:table-cell>
          <table:table-cell table:style-name="ce5" office:value-type="string" calcext:value-type="string">
            <text:p><text:span text:style-name="T1">股票投资</text:span></text:p>
            <text:p><text:span text:style-name="T1">（不含H股</text:span></text:p>
            <text:p><text:span text:style-name="T1">）</text:span></text:p>
          </table:table-cell>
          <table:table-cell office:value-type="string" calcext:value-type="string">
            <text:p><text:span text:style-name="T2">2017</text:span><text:span text:style-name="T3">年</text:span><text:span text:style-name="T4">1000</text:span><text:span text:style-name="T3">股</text:span>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中国神华能</text:span></text:p>
            <text:p><text:span text:style-name="T1">源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71</text:span></text:p>
            <text:p><text:span text:style-name="T1">0933024J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4" office:value-type="string" calcext:value-type="string">
            <text:p>2019年8500股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中国建设银</text:span></text:p>
            <text:p><text:span text:style-name="T1">行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10</text:span></text:p>
            <text:p><text:span text:style-name="T1">00044477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4</text:span><text:span text:style-name="T3">年</text:span><text:span text:style-name="T4">1</text:span><text:span text:style-name="T3">月</text:span><text:span text:style-name="T4">35000</text:span><text:span text:style-name="T3">股</text:span>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中国石油化</text:span></text:p>
            <text:p><text:span text:style-name="T1">工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71</text:span></text:p>
            <text:p><text:span text:style-name="T1">0926094P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4" office:value-type="string" calcext:value-type="string">
            <text:p>2022年16000股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1">中国中铁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11000071</text:span></text:p>
            <text:p><text:span text:style-name="T1">0935003U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13" office:value-type="string" calcext:value-type="string">
            <text:p><text:span text:style-name="T5">2021</text:span><text:span text:style-name="T6">年</text:span><text:span text:style-name="T7">10000</text:span><text:span text:style-name="T6">股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1">中国铁塔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11000071</text:span></text:p>
            <text:p><text:span text:style-name="T1">7843275N</text:span></text:p>
          </table:table-cell>
          <table:table-cell office:value-type="string" calcext:value-type="string">
            <text:p><text:span text:style-name="T1">股票投资</text:span></text:p>
            <text:p><text:span text:style-name="T1">（沪港通 H股投资）</text:span></text:p>
          </table:table-cell>
          <table:table-cell office:value-type="string" calcext:value-type="string">
            <text:p><text:span text:style-name="T2">2023</text:span><text:span text:style-name="T3">年</text:span><text:span text:style-name="T4">3000</text:span><text:span text:style-name="T3">股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中国神华能</text:span></text:p>
            <text:p><text:span text:style-name="T1">源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71</text:span></text:p>
            <text:p><text:span text:style-name="T1">0933024J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13" office:value-type="string" calcext:value-type="string">
            <text:p><text:span text:style-name="T5">2019</text:span><text:span text:style-name="T6">年</text:span><text:span text:style-name="T7">8500</text:span><text:span text:style-name="T6">股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华能国际电</text:span></text:p>
            <text:p><text:span text:style-name="T1">力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62</text:span></text:p>
            <text:p><text:span text:style-name="T1">5905205U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2</text:span><text:span text:style-name="T3">年</text:span><text:span text:style-name="T4">16000</text:span><text:span text:style-name="T3">股</text:span>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<text:span text:style-name="T1">四川成渝高</text:span></text:p>
          </table:table-cell>
          <table:table-cell table:style-name="ce7" table:number-columns-repeated="2"/>
          <table:table-cell table:style-name="ce9" office:value-type="float" office:value="9151000020" calcext:value-type="float">
            <text:p>9151000020</text:p>
          </table:table-cell>
          <table:table-cell table:style-name="ce10" office:value-type="string" calcext:value-type="string">
            <text:p><text:span text:style-name="T1">股票投资</text:span></text:p>
          </table:table-cell>
          <table:table-cell office:value-type="string" calcext:value-type="string">
            <text:p><text:span text:style-name="T2">2021</text:span><text:span text:style-name="T3">年</text:span><text:span text:style-name="T4">50000</text:span><text:span text:style-name="T3">股</text:span></text:p>
          </table:table-cell>
        </table:table-row>
        <table:table-row table:style-name="ro6">
          <table:table-cell table:style-name="ce3"/>
          <table:table-cell office:value-type="string" calcext:value-type="string">
            <text:p><text:span text:style-name="T1">速公路股份</text:span></text:p>
            <text:p><text:span text:style-name="T1">有限公司</text:span></text:p>
          </table:table-cell>
          <table:table-cell table:number-columns-repeated="2"/>
          <table:table-cell table:style-name="ce10" office:value-type="string" calcext:value-type="string">
            <text:p><text:span text:style-name="T1">189926XW</text:span></text:p>
          </table:table-cell>
          <table:table-cell office:value-type="string" calcext:value-type="string">
            <text:p><text:span text:style-name="T1">（沪港通</text:span></text:p>
            <text:p><text:span text:style-name="T1">H股投资）</text:span></text:p>
          </table:table-cell>
          <table:table-cell table:style-name="ce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中国光大银</text:span></text:p>
            <text:p><text:span text:style-name="T1">行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10</text:span></text:p>
            <text:p><text:span text:style-name="T1">0011743X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1</text:span><text:span text:style-name="T3">年</text:span><text:span text:style-name="T4">45000</text:span><text:span text:style-name="T3">股</text:span>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中国工商银</text:span></text:p>
            <text:p><text:span text:style-name="T1">行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0000010</text:span></text:p>
            <text:p><text:span text:style-name="T1">0003962T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19</text:span><text:span text:style-name="T3">年</text:span><text:span text:style-name="T4">5000</text:span><text:span text:style-name="T3">股</text:span>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<text:span text:style-name="T1">招商银行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44030010</text:span></text:p>
            <text:p><text:span text:style-name="T1">001686XA</text:span></text:p>
          </table:table-cell>
          <table:table-cell office:value-type="string" calcext:value-type="string">
            <text:p><text:span text:style-name="T1">股票投资</text:span></text:p>
            <text:p><text:span text:style-name="T1">（沪港通 H股投资）</text:span></text:p>
          </table:table-cell>
          <table:table-cell office:value-type="string" calcext:value-type="string">
            <text:p><text:span text:style-name="T2">2017</text:span><text:span text:style-name="T3">年前</text:span><text:span text:style-name="T4">7500</text:span><text:span text:style-name="T3">股</text:span>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四川成渝高</text:span></text:p>
            <text:p><text:span text:style-name="T1">速公路股份有限公司</text:span></text:p>
          </table:table-cell>
          <table:table-cell table:number-columns-repeated="2"/>
          <table:table-cell office:value-type="string" calcext:value-type="string">
            <text:p><text:span text:style-name="T1">9151000020</text:span></text:p>
            <text:p><text:span text:style-name="T1">189926XW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2</text:span><text:span text:style-name="T3">年</text:span><text:span text:style-name="T4">20000</text:span><text:span text:style-name="T3">股</text:span>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大唐国际发</text:span></text:p>
            <text:p><text:span text:style-name="T1">电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10</text:span></text:p>
            <text:p><text:span text:style-name="T1">0017336T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0</text:span><text:span text:style-name="T3">年</text:span><text:span text:style-name="T4">20000</text:span><text:span text:style-name="T3">股</text:span>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<text:span text:style-name="T1">中国中铁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11000071</text:span></text:p>
            <text:p><text:span text:style-name="T1">0935003U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4" office:value-type="string" calcext:value-type="string">
            <text:p>2021年10000股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中国建设银</text:span></text:p>
            <text:p><text:span text:style-name="T1">行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10</text:span></text:p>
            <text:p><text:span text:style-name="T1">00044477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4" office:value-type="string" calcext:value-type="string">
            <text:p>2024年1月35000股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<text:span text:style-name="T1">江西铜业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36000062</text:span></text:p>
            <text:p><text:span text:style-name="T1">5912173B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4" office:value-type="string" calcext:value-type="string">
            <text:p>2022年3000股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中国光大银</text:span></text:p>
            <text:p><text:span text:style-name="T1">行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10</text:span></text:p>
            <text:p><text:span text:style-name="T1">0011743X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1</text:span><text:span text:style-name="T3">年</text:span><text:span text:style-name="T4">45000</text:span><text:span text:style-name="T3">股</text:span>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大唐国际发</text:span></text:p>
            <text:p><text:span text:style-name="T1">电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10</text:span></text:p>
            <text:p><text:span text:style-name="T1">0017336T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4" office:value-type="string" calcext:value-type="string">
            <text:p>2020年20000股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1">青岛港国际</text:span></text:p>
            <text:p><text:span text:style-name="T1">股份有限公</text:span></text:p>
            <text:p><text:span text:style-name="T1">司</text:span></text:p>
          </table:table-cell>
          <table:table-cell table:style-name="ce5" table:number-columns-repeated="2"/>
          <table:table-cell office:value-type="string" calcext:value-type="string">
            <text:p><text:span text:style-name="T1">9137020008</text:span></text:p>
            <text:p><text:span text:style-name="T1">1422810C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18</text:span><text:span text:style-name="T3">年</text:span><text:span text:style-name="T4">40000</text:span><text:span text:style-name="T3">股</text:span>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<text:span text:style-name="T1">中国铁塔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11000071</text:span></text:p>
            <text:p><text:span text:style-name="T1">7843275N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3</text:span><text:span text:style-name="T3">年</text:span><text:span text:style-name="T4">3000</text:span><text:span text:style-name="T3">股</text:span>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<text:span text:style-name="T1">中广核核电</text:span></text:p>
            <text:p><text:span text:style-name="T1">投资有限公</text:span></text:p>
            <text:p><text:span text:style-name="T1">司</text:span></text:p>
          </table:table-cell>
          <table:table-cell table:style-name="ce5" table:number-columns-repeated="2"/>
          <table:table-cell office:value-type="string" calcext:value-type="string">
            <text:p><text:span text:style-name="T1">9144030058</text:span></text:p>
            <text:p><text:span text:style-name="T1">40708960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12" office:value-type="string" calcext:value-type="string">
            <text:p><text:span text:style-name="T5">2021</text:span><text:span text:style-name="T6">年</text:span><text:span text:style-name="T7">7000</text:span><text:span text:style-name="T6">股</text:span>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中国民生银</text:span></text:p>
            <text:p><text:span text:style-name="T1">行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10</text:span></text:p>
            <text:p><text:span text:style-name="T1">0018988F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4" office:value-type="string" calcext:value-type="string">
            <text:p>2021年7000股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<text:span text:style-name="T1">招商银行股份有限公司</text:span></text:p>
          </table:table-cell>
          <table:table-cell table:style-name="ce6" table:number-columns-repeated="2"/>
          <table:table-cell office:value-type="string" calcext:value-type="string">
            <text:p><text:span text:style-name="T1">9144030010</text:span></text:p>
            <text:p><text:span text:style-name="T1">001686XA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office:value-type="string" calcext:value-type="string">
            <text:p><text:span text:style-name="T2">2024</text:span><text:span text:style-name="T3">年</text:span><text:span text:style-name="T4">1</text:span><text:span text:style-name="T3">月</text:span><text:span text:style-name="T4">4000</text:span><text:span text:style-name="T3">股</text:span>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中国民生银</text:span></text:p>
            <text:p><text:span text:style-name="T1">行股份有限</text:span></text:p>
            <text:p><text:span text:style-name="T1">公司</text:span></text:p>
          </table:table-cell>
          <table:table-cell table:number-columns-repeated="2"/>
          <table:table-cell office:value-type="string" calcext:value-type="string">
            <text:p><text:span text:style-name="T1">9111000010</text:span></text:p>
            <text:p><text:span text:style-name="T1">0018988F</text:span></text:p>
          </table:table-cell>
          <table:table-cell office:value-type="string" calcext:value-type="string">
            <text:p><text:span text:style-name="T1">股票投资</text:span></text:p>
            <text:p><text:span text:style-name="T1">（深港通 H股投资）</text:span></text:p>
          </table:table-cell>
          <table:table-cell table:style-name="ce12" office:value-type="string" calcext:value-type="string">
            <text:p><text:span text:style-name="T5">2021</text:span><text:span text:style-name="T6">年</text:span><text:span text:style-name="T7">7000</text:span><text:span text:style-name="T6">股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宋体" svg:font-family="宋体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8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8P2" style:volatile="true">
      <number:text loext:blank-width-char=" "> </number:text>
      <number:fill-character> </number:fill-character>
      <number:text>- _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 "> 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9P1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9P2" style:volatile="true">
      <number:text loext:blank-width-char=" "> ￥</number:text>
      <number:fill-character> </number:fill-character>
      <number:text>- _ </number:text>
    </number:number-style>
    <number:text-style style:name="N129">
      <number:text loext:blank-width-char=" "> </number:text>
      <number:text-content/>
      <number:text loext:blank-width-char=" 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0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 "> 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1P1" style:volatile="true">
      <number:text loext:blank-width-char=" "> 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1P2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1">
      <number:text loext:blank-width-char=" "> </number:text>
      <number:text-content/>
      <number:text loext:blank-width-char=" 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4" number:min-decimal-places="4" number:min-integer-digits="1"/>
    </number:number-style>
    <number:date-style style:name="N13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37">
      <number:text-content/>
      <style:map style:condition="value()&lt;=1.7976931348623157E+308" style:apply-style-name="N137P0"/>
    </number:text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6T12:38:18.397622800</meta:creation-date>
    <dc:date>2026-06-26T12:41:53.650511600</dc:date>
    <meta:editing-duration>PT3M35S</meta:editing-duration>
    <meta:editing-cycles>1</meta:editing-cycles>
    <meta:document-statistic meta:table-count="1" meta:cell-count="170" meta:object-count="0"/>
    <meta:generator>LibreOffice/25.2.7.2$Windows_X86_64 LibreOffice_project/5cbfd1ab6520636bb5f7b99185aa69bd7456825d</meta:generator>
  </office:meta>
</office:document-meta>
</file>